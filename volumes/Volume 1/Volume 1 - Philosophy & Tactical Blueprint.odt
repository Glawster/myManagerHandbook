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adornments="Bold" style:font-family-generic="swiss"/>
    <style:font-face style:name="Calibri2" svg:font-family="Calibri" style:font-adornments="Regular"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trick Hand" svg:font-family="'Patrick Hand'" style:font-adornments="Bold Italic" style:font-pitch="variable"/>
    <style:font-face style:name="Tahoma" svg:font-family="Tahoma"/>
    <style:font-face style:name="Tahoma1" svg:font-family="Tahoma" style:font-adornments="Bold" style:font-family-generic="swiss"/>
    <style:font-face style:name="Tahoma2" svg:font-family="Tahoma" style:font-adornments="Regular" style:font-family-generic="swiss"/>
  </office:font-face-decls>
  <office:automatic-styles>
    <style:style style:name="P1" style:family="paragraph" style:parent-style-name="Body_20_Text">
      <style:paragraph-properties fo:text-align="center" style:justify-single-word="false"/>
    </style:style>
    <style:style style:name="P2" style:family="paragraph" style:parent-style-name="Body_20_Text">
      <style:paragraph-properties fo:text-align="end" style:justify-single-word="false"/>
    </style:style>
    <style:style style:name="P3" style:family="paragraph" style:parent-style-name="Body_20_Text">
      <style:text-properties officeooo:rsid="0006db54" officeooo:paragraph-rsid="0006db54"/>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hapter_20_Title">
      <style:text-properties officeooo:paragraph-rsid="0029a016"/>
    </style:style>
    <style:style style:name="P8" style:family="paragraph" style:parent-style-name="Chapter_20_Title" style:list-style-name="">
      <style:paragraph-properties fo:text-align="start" style:justify-single-word="false">
        <style:tab-stops>
          <style:tab-stop style:position="1.111cm"/>
        </style:tab-stops>
      </style:paragraph-properties>
    </style:style>
    <style:style style:name="P9" style:family="paragraph" style:parent-style-name="Chapter_20_Title" style:master-page-name="appendix">
      <style:paragraph-properties style:page-number="auto"/>
    </style:style>
    <style:style style:name="P10" style:family="paragraph" style:parent-style-name="Part_20_Title" style:master-page-name="chapter">
      <style:paragraph-properties style:page-number="auto"/>
    </style:style>
    <style:style style:name="P11" style:family="paragraph" style:parent-style-name="Part_20_Title" style:master-page-name="chapter">
      <style:paragraph-properties style:page-number="auto"/>
      <style:text-properties officeooo:paragraph-rsid="0029a016"/>
    </style:style>
    <style:style style:name="P12" style:family="paragraph" style:parent-style-name="Part_20_Title" style:master-page-name="chapter">
      <style:paragraph-properties style:page-number="auto"/>
      <style:text-properties officeooo:paragraph-rsid="002a2237"/>
    </style:style>
    <style:style style:name="P13" style:family="paragraph" style:parent-style-name="Part_20_Title">
      <style:text-properties officeooo:paragraph-rsid="002a2237"/>
    </style:style>
    <style:style style:name="T1" style:family="text">
      <style:text-properties officeooo:rsid="0011e173"/>
    </style:style>
    <style:style style:name="T2" style:family="text">
      <style:text-properties officeooo:rsid="00148293"/>
    </style:style>
    <style:style style:name="T3" style:family="text">
      <style:text-properties officeooo:rsid="002d8be8"/>
    </style:style>
    <style:style style:name="T4" style:family="text">
      <style:text-properties officeooo:rsid="0031826a"/>
    </style:style>
    <style:style style:name="T5" style:family="text">
      <style:text-properties officeooo:rsid="00331a9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ok_20_Title"><text:title>The Manager's Handbook</text:title></text:p>
      <text:p text:style-name="Book_20_Subtitle">Volume <text:user-defined style:data-style-name="N0" text:name="Volume">1</text:user-defined></text:p>
      <text:p text:style-name="Book_20_Subtitle"><text:subject>Philosophy and Tactical Blueprint</text:subject></text:p>
      <text:p text:style-name="Book_20_Subtitle"><text:user-defined style:data-style-name="N0" text:name="Author">Andy Wilson</text:user-defined></text:p>
      <text:p text:style-name="Book_20_Subtitle"><text:user-defined style:data-style-name="N0" text:name="FMVersion">Football Manager 2026 Edition</text:user-defined></text:p>
      <text:p text:style-name="Book_20_Subtitle">Version <text:user-defined style:data-style-name="N0" text:name="Version">0.1.0</text:user-defined></text:p>
      <text:p text:style-name="Book_20_Subtitle"/>
      <text:p text:style-name="Book_20_Subtitle"/>
      <text:table-of-content text:style-name="Sect1" text:protected="true" text:name="Table of Contents1">
        <text:table-of-content-source text:outline-level="4">
          <text:index-title-template text:style-name="Chapter_20_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hapter_20_Title" text:outline-level="2">Table of Contents</text:h>
          </text:index-title>
          <text:p text:style-name="P4"><text:a xlink:type="simple" xlink:href="#__RefHeading___Toc956_3226105849" text:style-name="Index_20_Link" text:visited-style-name="Index_20_Link">Part I - Foundations<text:tab/>4</text:a></text:p>
          <text:p text:style-name="P5"><text:a xlink:type="simple" xlink:href="#__RefHeading___Toc306_3226105849" text:style-name="Index_20_Link" text:visited-style-name="Index_20_Link">Football Before Formations<text:tab/>4</text:a></text:p>
          <text:p text:style-name="P6"><text:a xlink:type="simple" xlink:href="#__RefHeading___Toc308_3226105849" text:style-name="Index_20_Link" text:visited-style-name="Index_20_Link">Why this handbook exists<text:tab/>4</text:a></text:p>
          <text:p text:style-name="P6"><text:a xlink:type="simple" xlink:href="#__RefHeading___Toc310_3226105849" text:style-name="Index_20_Link" text:visited-style-name="Index_20_Link">Football is about solving problems<text:tab/>4</text:a></text:p>
          <text:p text:style-name="P6"><text:a xlink:type="simple" xlink:href="#__RefHeading___Toc312_3226105849" text:style-name="Index_20_Link" text:visited-style-name="Index_20_Link">Principles before systems<text:tab/>4</text:a></text:p>
          <text:p text:style-name="P6"><text:a xlink:type="simple" xlink:href="#__RefHeading___Toc314_3226105849" text:style-name="Index_20_Link" text:visited-style-name="Index_20_Link">The manager's cycle<text:tab/>4</text:a></text:p>
          <text:p text:style-name="P6"><text:a xlink:type="simple" xlink:href="#__RefHeading___Toc316_3226105849" text:style-name="Index_20_Link" text:visited-style-name="Index_20_Link">How to use this handbook<text:tab/>4</text:a></text:p>
          <text:p text:style-name="P5"><text:a xlink:type="simple" xlink:href="#__RefHeading___Toc318_3226105849" text:style-name="Index_20_Link" text:visited-style-name="Index_20_Link">Understanding the Match Engine<text:tab/>4</text:a></text:p>
          <text:p text:style-name="P6"><text:a xlink:type="simple" xlink:href="#__RefHeading___Toc320_3226105849" text:style-name="Index_20_Link" text:visited-style-name="Index_20_Link">What FM actually simulates<text:tab/>4</text:a></text:p>
          <text:p text:style-name="P6"><text:a xlink:type="simple" xlink:href="#__RefHeading___Toc322_3226105849" text:style-name="Index_20_Link" text:visited-style-name="Index_20_Link">Decision making<text:tab/>4</text:a></text:p>
          <text:p text:style-name="P6"><text:a xlink:type="simple" xlink:href="#__RefHeading___Toc324_3226105849" text:style-name="Index_20_Link" text:visited-style-name="Index_20_Link">Attributes<text:tab/>4</text:a></text:p>
          <text:p text:style-name="P6"><text:a xlink:type="simple" xlink:href="#__RefHeading___Toc326_3226105849" text:style-name="Index_20_Link" text:visited-style-name="Index_20_Link">Roles<text:tab/>4</text:a></text:p>
          <text:p text:style-name="P6"><text:a xlink:type="simple" xlink:href="#__RefHeading___Toc328_3226105849" text:style-name="Index_20_Link" text:visited-style-name="Index_20_Link">Team Instructions<text:tab/>4</text:a></text:p>
          <text:p text:style-name="P6"><text:a xlink:type="simple" xlink:href="#__RefHeading___Toc330_3226105849" text:style-name="Index_20_Link" text:visited-style-name="Index_20_Link">Hidden interactions<text:tab/>4</text:a></text:p>
          <text:p text:style-name="P6"><text:a xlink:type="simple" xlink:href="#__RefHeading___Toc332_3226105849" text:style-name="Index_20_Link" text:visited-style-name="Index_20_Link">Match Engine vs Reality<text:tab/>4</text:a></text:p>
          <text:p text:style-name="P5"><text:a xlink:type="simple" xlink:href="#__RefHeading___Toc334_3226105849" text:style-name="Index_20_Link" text:visited-style-name="Index_20_Link">Building a Tactical Identity<text:tab/>5</text:a></text:p>
          <text:p text:style-name="P6"><text:a xlink:type="simple" xlink:href="#__RefHeading___Toc336_3226105849" text:style-name="Index_20_Link" text:visited-style-name="Index_20_Link">How do you want your team to play?<text:tab/>5</text:a></text:p>
          <text:p text:style-name="P6"><text:a xlink:type="simple" xlink:href="#__RefHeading___Toc338_3226105849" text:style-name="Index_20_Link" text:visited-style-name="Index_20_Link">Core principles<text:tab/>5</text:a></text:p>
          <text:p text:style-name="P6"><text:a xlink:type="simple" xlink:href="#__RefHeading___Toc340_3226105849" text:style-name="Index_20_Link" text:visited-style-name="Index_20_Link">Defensive identity<text:tab/>5</text:a></text:p>
          <text:p text:style-name="P6"><text:a xlink:type="simple" xlink:href="#__RefHeading___Toc342_3226105849" text:style-name="Index_20_Link" text:visited-style-name="Index_20_Link">Attacking identity<text:tab/>5</text:a></text:p>
          <text:p text:style-name="P6"><text:a xlink:type="simple" xlink:href="#__RefHeading___Toc344_3226105849" text:style-name="Index_20_Link" text:visited-style-name="Index_20_Link">Transition identity<text:tab/>5</text:a></text:p>
          <text:p text:style-name="P4"><text:soft-page-break/><text:a xlink:type="simple" xlink:href="#__RefHeading___Toc958_3226105849" text:style-name="Index_20_Link" text:visited-style-name="Index_20_Link">Part II - Tactical Blueprint<text:tab/>6</text:a></text:p>
          <text:p text:style-name="P5"><text:a xlink:type="simple" xlink:href="#__RefHeading___Toc346_3226105849" text:style-name="Index_20_Link" text:visited-style-name="Index_20_Link">Space<text:tab/>6</text:a></text:p>
          <text:p text:style-name="P6"><text:a xlink:type="simple" xlink:href="#__RefHeading___Toc348_3226105849" text:style-name="Index_20_Link" text:visited-style-name="Index_20_Link">Width<text:tab/>6</text:a></text:p>
          <text:p text:style-name="P6"><text:a xlink:type="simple" xlink:href="#__RefHeading___Toc350_3226105849" text:style-name="Index_20_Link" text:visited-style-name="Index_20_Link">Depth<text:tab/>6</text:a></text:p>
          <text:p text:style-name="P6"><text:a xlink:type="simple" xlink:href="#__RefHeading___Toc352_3226105849" text:style-name="Index_20_Link" text:visited-style-name="Index_20_Link">Half-spaces<text:tab/>6</text:a></text:p>
          <text:p text:style-name="P6"><text:a xlink:type="simple" xlink:href="#__RefHeading___Toc354_3226105849" text:style-name="Index_20_Link" text:visited-style-name="Index_20_Link">Central overloads<text:tab/>6</text:a></text:p>
          <text:p text:style-name="P6"><text:a xlink:type="simple" xlink:href="#__RefHeading___Toc356_3226105849" text:style-name="Index_20_Link" text:visited-style-name="Index_20_Link">Numerical superiority<text:tab/>6</text:a></text:p>
          <text:p text:style-name="P5"><text:a xlink:type="simple" xlink:href="#__RefHeading___Toc358_3226105849" text:style-name="Index_20_Link" text:visited-style-name="Index_20_Link">Team Shape<text:tab/>6</text:a></text:p>
          <text:p text:style-name="P6"><text:a xlink:type="simple" xlink:href="#__RefHeading___Toc360_3226105849" text:style-name="Index_20_Link" text:visited-style-name="Index_20_Link">Formations<text:tab/>6</text:a></text:p>
          <text:p text:style-name="P6"><text:a xlink:type="simple" xlink:href="#__RefHeading___Toc362_3226105849" text:style-name="Index_20_Link" text:visited-style-name="Index_20_Link">Rest defence<text:tab/>6</text:a></text:p>
          <text:p text:style-name="P6"><text:a xlink:type="simple" xlink:href="#__RefHeading___Toc364_3226105849" text:style-name="Index_20_Link" text:visited-style-name="Index_20_Link">Defensive shape<text:tab/>6</text:a></text:p>
          <text:p text:style-name="P6"><text:a xlink:type="simple" xlink:href="#__RefHeading___Toc366_3226105849" text:style-name="Index_20_Link" text:visited-style-name="Index_20_Link">Attacking shape<text:tab/>6</text:a></text:p>
          <text:p text:style-name="P6"><text:a xlink:type="simple" xlink:href="#__RefHeading___Toc368_3226105849" text:style-name="Index_20_Link" text:visited-style-name="Index_20_Link">Fluidity<text:tab/>6</text:a></text:p>
          <text:p text:style-name="P5"><text:a xlink:type="simple" xlink:href="#__RefHeading___Toc370_3226105849" text:style-name="Index_20_Link" text:visited-style-name="Index_20_Link">Mentality<text:tab/>6</text:a></text:p>
          <text:p text:style-name="P6"><text:a xlink:type="simple" xlink:href="#__RefHeading___Toc372_3226105849" text:style-name="Index_20_Link" text:visited-style-name="Index_20_Link">What mentality actually changes<text:tab/>6</text:a></text:p>
          <text:p text:style-name="P6"><text:a xlink:type="simple" xlink:href="#__RefHeading___Toc374_3226105849" text:style-name="Index_20_Link" text:visited-style-name="Index_20_Link">Team mentality vs player mentality<text:tab/>6</text:a></text:p>
          <text:p text:style-name="P6"><text:a xlink:type="simple" xlink:href="#__RefHeading___Toc376_3226105849" text:style-name="Index_20_Link" text:visited-style-name="Index_20_Link">Risk<text:tab/>7</text:a></text:p>
          <text:p text:style-name="P6"><text:a xlink:type="simple" xlink:href="#__RefHeading___Toc378_3226105849" text:style-name="Index_20_Link" text:visited-style-name="Index_20_Link">Tempo<text:tab/>7</text:a></text:p>
          <text:p text:style-name="P6"><text:a xlink:type="simple" xlink:href="#__RefHeading___Toc380_3226105849" text:style-name="Index_20_Link" text:visited-style-name="Index_20_Link">Pressing<text:tab/>7</text:a></text:p>
          <text:p text:style-name="P5"><text:a xlink:type="simple" xlink:href="#__RefHeading___Toc382_3226105849" text:style-name="Index_20_Link" text:visited-style-name="Index_20_Link">Team Instructions<text:tab/>7</text:a></text:p>
          <text:p text:style-name="P6"><text:a xlink:type="simple" xlink:href="#__RefHeading___Toc384_3226105849" text:style-name="Index_20_Link" text:visited-style-name="Index_20_Link">In Possession<text:tab/>7</text:a></text:p>
          <text:p text:style-name="P6"><text:a xlink:type="simple" xlink:href="#__RefHeading___Toc386_3226105849" text:style-name="Index_20_Link" text:visited-style-name="Index_20_Link">In Transition<text:tab/>7</text:a></text:p>
          <text:p text:style-name="P6"><text:a xlink:type="simple" xlink:href="#__RefHeading___Toc388_3226105849" text:style-name="Index_20_Link" text:visited-style-name="Index_20_Link">Out of Possession<text:tab/>7</text:a></text:p>
          <text:p text:style-name="P4"><text:a xlink:type="simple" xlink:href="#__RefHeading___Toc960_3226105849" text:style-name="Index_20_Link" text:visited-style-name="Index_20_Link">Part III - The Players<text:tab/>8</text:a></text:p>
          <text:p text:style-name="P5"><text:a xlink:type="simple" xlink:href="#__RefHeading___Toc390_3226105849" text:style-name="Index_20_Link" text:visited-style-name="Index_20_Link">Player Roles &amp; Duties<text:tab/>8</text:a></text:p>
          <text:p text:style-name="P6"><text:a xlink:type="simple" xlink:href="#__RefHeading___Toc392_3226105849" text:style-name="Index_20_Link" text:visited-style-name="Index_20_Link">Roles explained<text:tab/>8</text:a></text:p>
          <text:p text:style-name="P6"><text:a xlink:type="simple" xlink:href="#__RefHeading___Toc394_3226105849" text:style-name="Index_20_Link" text:visited-style-name="Index_20_Link">Duties<text:tab/>8</text:a></text:p>
          <text:p text:style-name="P6"><text:a xlink:type="simple" xlink:href="#__RefHeading___Toc396_3226105849" text:style-name="Index_20_Link" text:visited-style-name="Index_20_Link">Partnerships<text:tab/>8</text:a></text:p>
          <text:p text:style-name="P6"><text:a xlink:type="simple" xlink:href="#__RefHeading___Toc398_3226105849" text:style-name="Index_20_Link" text:visited-style-name="Index_20_Link">Complementary roles<text:tab/>8</text:a></text:p>
          <text:p text:style-name="P5"><text:a xlink:type="simple" xlink:href="#__RefHeading___Toc400_3226105849" text:style-name="Index_20_Link" text:visited-style-name="Index_20_Link">Player Instructions<text:tab/>8</text:a></text:p>
          <text:p text:style-name="P6"><text:a xlink:type="simple" xlink:href="#__RefHeading___Toc402_3226105849" text:style-name="Index_20_Link" text:visited-style-name="Index_20_Link">When to override a role<text:tab/>8</text:a></text:p>
          <text:p text:style-name="P6"><text:a xlink:type="simple" xlink:href="#__RefHeading___Toc404_3226105849" text:style-name="Index_20_Link" text:visited-style-name="Index_20_Link">Simplicity<text:tab/>8</text:a></text:p>
          <text:p text:style-name="P6"><text:a xlink:type="simple" xlink:href="#__RefHeading___Toc406_3226105849" text:style-name="Index_20_Link" text:visited-style-name="Index_20_Link">Common mistakes<text:tab/>8</text:a></text:p>
          <text:p text:style-name="P4"><text:a xlink:type="simple" xlink:href="#__RefHeading___Toc962_3226105849" text:style-name="Index_20_Link" text:visited-style-name="Index_20_Link">Part IV - Match Management<text:tab/>ix</text:a></text:p>
          <text:p text:style-name="P5"><text:a xlink:type="simple" xlink:href="#__RefHeading___Toc408_3226105849" text:style-name="Index_20_Link" text:visited-style-name="Index_20_Link">Opposition Analysis<text:tab/>ix</text:a></text:p>
          <text:p text:style-name="P6"><text:a xlink:type="simple" xlink:href="#__RefHeading___Toc410_3226105849" text:style-name="Index_20_Link" text:visited-style-name="Index_20_Link">Scouting<text:tab/>ix</text:a></text:p>
          <text:p text:style-name="P6"><text:a xlink:type="simple" xlink:href="#__RefHeading___Toc412_3226105849" text:style-name="Index_20_Link" text:visited-style-name="Index_20_Link">Opposition reports<text:tab/>ix</text:a></text:p>
          <text:p text:style-name="P6"><text:a xlink:type="simple" xlink:href="#__RefHeading___Toc414_3226105849" text:style-name="Index_20_Link" text:visited-style-name="Index_20_Link">Identifying weaknesses<text:tab/>ix</text:a></text:p>
          <text:p text:style-name="P5"><text:a xlink:type="simple" xlink:href="#__RefHeading___Toc416_3226105849" text:style-name="Index_20_Link" text:visited-style-name="Index_20_Link">Match Day<text:tab/>ix</text:a></text:p>
          <text:p text:style-name="P6"><text:soft-page-break/><text:a xlink:type="simple" xlink:href="#__RefHeading___Toc418_3226105849" text:style-name="Index_20_Link" text:visited-style-name="Index_20_Link">Reading the match<text:tab/>ix</text:a></text:p>
          <text:p text:style-name="P6"><text:a xlink:type="simple" xlink:href="#__RefHeading___Toc420_3226105849" text:style-name="Index_20_Link" text:visited-style-name="Index_20_Link">Tactical tweaks<text:tab/>ix</text:a></text:p>
          <text:p text:style-name="P6"><text:a xlink:type="simple" xlink:href="#__RefHeading___Toc422_3226105849" text:style-name="Index_20_Link" text:visited-style-name="Index_20_Link">Shouts<text:tab/>ix</text:a></text:p>
          <text:p text:style-name="P6"><text:a xlink:type="simple" xlink:href="#__RefHeading___Toc424_3226105849" text:style-name="Index_20_Link" text:visited-style-name="Index_20_Link">Substitutions<text:tab/>ix</text:a></text:p>
          <text:p text:style-name="P5"><text:a xlink:type="simple" xlink:href="#__RefHeading___Toc426_3226105849" text:style-name="Index_20_Link" text:visited-style-name="Index_20_Link">Performance Analysis<text:tab/>ix</text:a></text:p>
          <text:p text:style-name="P6"><text:a xlink:type="simple" xlink:href="#__RefHeading___Toc428_3226105849" text:style-name="Index_20_Link" text:visited-style-name="Index_20_Link">xG<text:tab/>ix</text:a></text:p>
          <text:p text:style-name="P6"><text:a xlink:type="simple" xlink:href="#__RefHeading___Toc430_3226105849" text:style-name="Index_20_Link" text:visited-style-name="Index_20_Link">Data Hub<text:tab/>ix</text:a></text:p>
          <text:p text:style-name="P6"><text:a xlink:type="simple" xlink:href="#__RefHeading___Toc432_3226105849" text:style-name="Index_20_Link" text:visited-style-name="Index_20_Link">Momentum<text:tab/>ix</text:a></text:p>
          <text:p text:style-name="P6"><text:a xlink:type="simple" xlink:href="#__RefHeading___Toc434_3226105849" text:style-name="Index_20_Link" text:visited-style-name="Index_20_Link">Player ratings<text:tab/>ix</text:a></text:p>
          <text:p text:style-name="P6"><text:a xlink:type="simple" xlink:href="#__RefHeading___Toc436_3226105849" text:style-name="Index_20_Link" text:visited-style-name="Index_20_Link">Learning from matches<text:tab/>ix</text:a></text:p>
          <text:p text:style-name="P5"><text:a xlink:type="simple" xlink:href="#__RefHeading___Toc274_874366845" text:style-name="Index_20_Link" text:visited-style-name="Index_20_Link">Appendix – Revision History<text:tab/>11</text:a></text:p>
        </text:index-body>
      </text:table-of-content>
      <text:p text:style-name="Body_20_Text"/>
      <text:h text:style-name="P10" text:outline-level="1"><text:bookmark-start text:name="__RefHeading___Toc956_3226105849"/>Part <text:span text:style-name="T3">I - </text:span>Foundations<text:bookmark-end text:name="__RefHeading___Toc956_3226105849"/></text:h>
      <text:h text:style-name="P7" text:outline-level="2"><text:bookmark-start text:name="__RefHeading___Toc306_3226105849"/>Football Before Formations<text:bookmark-end text:name="__RefHeading___Toc306_3226105849"/></text:h>
      <text:h text:style-name="Section_20_Title" text:outline-level="3"><text:bookmark-start text:name="__RefHeading___Toc308_3226105849"/>Why <text:span text:style-name="T5">T</text:span>his <text:span text:style-name="T5">H</text:span>andbook <text:span text:style-name="T5">E</text:span>xists <text:bookmark-end text:name="__RefHeading___Toc308_3226105849"/></text:h>
      <text:p text:style-name="Body_20_Text">Football has never been a game of formations.</text:p>
      <text:p text:style-name="Body_20_Text">Long before tactics could be selected from a computer screen, coaches were solving the same problems that exist today. How do I create space? How do I defend it? How do I attack without becoming vulnerable? How do I build a team that is greater than the sum of its parts?</text:p>
      <text:p text:style-name="Body_20_Text">Those questions have not changed.</text:p>
      <text:p text:style-name="Body_20_Text">What has changed is the tool.</text:p>
      <text:p text:style-name="Body_20_Text">Football Manager allows me to test ideas, observe behaviours and learn from thousands of matches. It provides an environment where tactical principles can be explored repeatedly, but it remains exactly that—a simulation of football, not football itself.</text:p>
      <text:p text:style-name="Body_20_Text">This handbook is therefore not about finding the perfect tactic.</text:p>
      <text:p text:style-name="Body_20_Text">I do not believe one exists.</text:p>
      <text:p text:style-name="Body_20_Text">Instead, this handbook records the principles that guide my thinking whenever I build a team. It explains how I approach football, why I make particular decisions and how Football Manager represents those ideas within its match engine.</text:p>
      <text:p text:style-name="Body_20_Text">Throughout these pages I will begin with football, not with Football Manager. Wherever possible I will explain the real principle first and then demonstrate how the game models it. Sometimes the simulation reflects reality remarkably well. Sometimes it simplifies or exaggerates it. Understanding that distinction is an important part of becoming a better manager.</text:p>
      <text:p text:style-name="Body_20_Text">My aim is not to copy another coach's tactic.</text:p>
      <text:p text:style-name="Body_20_Text">My aim is to build a tactical identity that fits my players, reflects my philosophy and evolves through observation, analysis and experience.</text:p>
      <text:p text:style-name="Body_20_Text">If this handbook achieves anything, I hope it encourages managers to stop asking, "What is the best formation?" and instead begin asking, "What problem am I trying to solve?"</text:p>
      <text:p text:style-name="Body_20_Text">Everything else follows from that question.</text:p>
      <text:p text:style-name="Body_20_Text"><text:soft-page-break/></text:p>
      <text:h text:style-name="Section_20_Title" text:outline-level="3"><text:bookmark-start text:name="__RefHeading___Toc310_3226105849"/>Football is <text:span text:style-name="T5">A</text:span>bout <text:span text:style-name="T5">S</text:span>olving <text:span text:style-name="T5">P</text:span>roblems <text:bookmark-end text:name="__RefHeading___Toc310_3226105849"/></text:h>
      <text:h text:style-name="Section_20_Title" text:outline-level="3"><text:bookmark-start text:name="__RefHeading___Toc312_3226105849"/>Principles <text:span text:style-name="T5">B</text:span>efore <text:span text:style-name="T5">S</text:span>ystems <text:bookmark-end text:name="__RefHeading___Toc312_3226105849"/></text:h>
      <text:h text:style-name="Section_20_Title" text:outline-level="3"><text:bookmark-start text:name="__RefHeading___Toc314_3226105849"/>The <text:span text:style-name="T5">M</text:span>anager's <text:span text:style-name="T5">C</text:span>ycle <text:bookmark-end text:name="__RefHeading___Toc314_3226105849"/></text:h>
      <text:h text:style-name="Section_20_Title" text:outline-level="3"><text:bookmark-start text:name="__RefHeading___Toc316_3226105849"/>How to <text:span text:style-name="T5">U</text:span>se <text:span text:style-name="T5">T</text:span>his <text:span text:style-name="T5">H</text:span>andbook <text:bookmark-end text:name="__RefHeading___Toc316_3226105849"/></text:h>
      <text:h text:style-name="Chapter_20_Title" text:outline-level="2"><text:bookmark-start text:name="__RefHeading___Toc318_3226105849"/><text:span text:style-name="Strong_20_Emphasis">Understanding the Match Engine</text:span><text:bookmark-end text:name="__RefHeading___Toc318_3226105849"/></text:h>
      <text:h text:style-name="Section_20_Title" text:outline-level="3"><text:bookmark-start text:name="__RefHeading___Toc320_3226105849"/>What FM <text:span text:style-name="T5">A</text:span>ctually <text:span text:style-name="T5">S</text:span>imulates <text:bookmark-end text:name="__RefHeading___Toc320_3226105849"/></text:h>
      <text:h text:style-name="Section_20_Title" text:outline-level="3"><text:bookmark-start text:name="__RefHeading___Toc322_3226105849"/>Decision <text:span text:style-name="T5">M</text:span>aking <text:bookmark-end text:name="__RefHeading___Toc322_3226105849"/></text:h>
      <text:h text:style-name="Section_20_Title" text:outline-level="3"><text:bookmark-start text:name="__RefHeading___Toc324_3226105849"/>Attributes <text:bookmark-end text:name="__RefHeading___Toc324_3226105849"/></text:h>
      <text:h text:style-name="Section_20_Title" text:outline-level="3"><text:bookmark-start text:name="__RefHeading___Toc326_3226105849"/>Roles <text:bookmark-end text:name="__RefHeading___Toc326_3226105849"/></text:h>
      <text:h text:style-name="Section_20_Title" text:outline-level="3"><text:bookmark-start text:name="__RefHeading___Toc328_3226105849"/>Team Instructions <text:bookmark-end text:name="__RefHeading___Toc328_3226105849"/></text:h>
      <text:h text:style-name="Section_20_Title" text:outline-level="3"><text:bookmark-start text:name="__RefHeading___Toc330_3226105849"/>Hidden <text:span text:style-name="T5">I</text:span>nteractions <text:bookmark-end text:name="__RefHeading___Toc330_3226105849"/></text:h>
      <text:h text:style-name="Section_20_Title" text:outline-level="3"><text:bookmark-start text:name="__RefHeading___Toc332_3226105849"/>Match Engine vs Reality <text:bookmark-end text:name="__RefHeading___Toc332_3226105849"/></text:h>
      <text:h text:style-name="Chapter_20_Title" text:outline-level="2"><text:bookmark-start text:name="__RefHeading___Toc334_3226105849"/><text:span text:style-name="Strong_20_Emphasis">Building a Tactical Identity</text:span><text:bookmark-end text:name="__RefHeading___Toc334_3226105849"/></text:h>
      <text:h text:style-name="Section_20_Title" text:outline-level="3"><text:bookmark-start text:name="__RefHeading___Toc336_3226105849"/>How <text:span text:style-name="T5">D</text:span>o <text:span text:style-name="T5">Y</text:span>ou <text:span text:style-name="T5">W</text:span>ant <text:span text:style-name="T5">Y</text:span>our <text:span text:style-name="T5">T</text:span>eam to <text:span text:style-name="T5">P</text:span>lay? <text:bookmark-end text:name="__RefHeading___Toc336_3226105849"/></text:h>
      <text:h text:style-name="Section_20_Title" text:outline-level="3"><text:bookmark-start text:name="__RefHeading___Toc338_3226105849"/>Core <text:span text:style-name="T5">P</text:span>rinciples <text:bookmark-end text:name="__RefHeading___Toc338_3226105849"/></text:h>
      <text:h text:style-name="Section_20_Title" text:outline-level="3"><text:bookmark-start text:name="__RefHeading___Toc340_3226105849"/>Defensive <text:span text:style-name="T5">I</text:span>dentity <text:bookmark-end text:name="__RefHeading___Toc340_3226105849"/></text:h>
      <text:h text:style-name="Section_20_Title" text:outline-level="3"><text:bookmark-start text:name="__RefHeading___Toc342_3226105849"/>Attacking <text:span text:style-name="T5">I</text:span>dentity <text:bookmark-end text:name="__RefHeading___Toc342_3226105849"/></text:h>
      <text:h text:style-name="Section_20_Title" text:outline-level="3"><text:bookmark-start text:name="__RefHeading___Toc344_3226105849"/>Transition <text:span text:style-name="T5">I</text:span>dentity <text:bookmark-end text:name="__RefHeading___Toc344_3226105849"/></text:h>
      <text:h text:style-name="P11" text:outline-level="1"><text:bookmark-start text:name="__RefHeading___Toc958_3226105849"/>Part <text:span text:style-name="T3">II - </text:span>Tactical Blueprint<text:bookmark-end text:name="__RefHeading___Toc958_3226105849"/></text:h>
      <text:h text:style-name="Chapter_20_Title" text:outline-level="2"><text:bookmark-start text:name="__RefHeading___Toc346_3226105849"/><text:span text:style-name="Strong_20_Emphasis">Space</text:span><text:bookmark-end text:name="__RefHeading___Toc346_3226105849"/></text:h>
      <text:h text:style-name="Section_20_Title" text:outline-level="3"><text:bookmark-start text:name="__RefHeading___Toc348_3226105849"/>Width <text:bookmark-end text:name="__RefHeading___Toc348_3226105849"/></text:h>
      <text:h text:style-name="Section_20_Title" text:outline-level="3"><text:bookmark-start text:name="__RefHeading___Toc350_3226105849"/>Depth <text:bookmark-end text:name="__RefHeading___Toc350_3226105849"/></text:h>
      <text:h text:style-name="Section_20_Title" text:outline-level="3"><text:bookmark-start text:name="__RefHeading___Toc352_3226105849"/>Half-<text:span text:style-name="T5">S</text:span>paces <text:bookmark-end text:name="__RefHeading___Toc352_3226105849"/></text:h>
      <text:h text:style-name="Section_20_Title" text:outline-level="3"><text:bookmark-start text:name="__RefHeading___Toc354_3226105849"/>Central <text:span text:style-name="T5">O</text:span>verloads <text:bookmark-end text:name="__RefHeading___Toc354_3226105849"/></text:h>
      <text:h text:style-name="Section_20_Title" text:outline-level="3"><text:bookmark-start text:name="__RefHeading___Toc356_3226105849"/>Numerical <text:span text:style-name="T5">S</text:span>uperiority<text:bookmark-end text:name="__RefHeading___Toc356_3226105849"/></text:h>
      <text:h text:style-name="Chapter_20_Title" text:outline-level="2"><text:bookmark-start text:name="__RefHeading___Toc358_3226105849"/><text:span text:style-name="Strong_20_Emphasis">Team Shape</text:span><text:bookmark-end text:name="__RefHeading___Toc358_3226105849"/></text:h>
      <text:h text:style-name="Section_20_Title" text:outline-level="3"><text:bookmark-start text:name="__RefHeading___Toc360_3226105849"/>Formations <text:bookmark-end text:name="__RefHeading___Toc360_3226105849"/></text:h>
      <text:h text:style-name="Section_20_Title" text:outline-level="3"><text:bookmark-start text:name="__RefHeading___Toc362_3226105849"/>Rest <text:span text:style-name="T5">D</text:span>efence <text:bookmark-end text:name="__RefHeading___Toc362_3226105849"/></text:h>
      <text:h text:style-name="Section_20_Title" text:outline-level="3"><text:bookmark-start text:name="__RefHeading___Toc364_3226105849"/>Defensive <text:span text:style-name="T5">S</text:span>hape <text:bookmark-end text:name="__RefHeading___Toc364_3226105849"/></text:h>
      <text:h text:style-name="Section_20_Title" text:outline-level="3"><text:bookmark-start text:name="__RefHeading___Toc366_3226105849"/>Attacking <text:span text:style-name="T5">S</text:span>hape <text:bookmark-end text:name="__RefHeading___Toc366_3226105849"/></text:h>
      <text:h text:style-name="Section_20_Title" text:outline-level="3"><text:bookmark-start text:name="__RefHeading___Toc368_3226105849"/>Fluidity <text:bookmark-end text:name="__RefHeading___Toc368_3226105849"/></text:h>
      <text:h text:style-name="Chapter_20_Title" text:outline-level="2"><text:bookmark-start text:name="__RefHeading___Toc370_3226105849"/><text:span text:style-name="Strong_20_Emphasis">Mentality</text:span><text:bookmark-end text:name="__RefHeading___Toc370_3226105849"/></text:h>
      <text:h text:style-name="Section_20_Title" text:outline-level="3"><text:bookmark-start text:name="__RefHeading___Toc372_3226105849"/>What <text:span text:style-name="T5">M</text:span>entality <text:span text:style-name="T5">A</text:span>ctually <text:span text:style-name="T5">C</text:span>hanges <text:bookmark-end text:name="__RefHeading___Toc372_3226105849"/></text:h>
      <text:h text:style-name="Section_20_Title" text:outline-level="3"><text:bookmark-start text:name="__RefHeading___Toc374_3226105849"/>Team <text:span text:style-name="T5">M</text:span>entality vs <text:span text:style-name="T5">P</text:span>layer <text:span text:style-name="T5">M</text:span>entality <text:bookmark-end text:name="__RefHeading___Toc374_3226105849"/></text:h>
      <text:h text:style-name="Section_20_Title" text:outline-level="3"><text:bookmark-start text:name="__RefHeading___Toc376_3226105849"/><text:soft-page-break/>Risk <text:bookmark-end text:name="__RefHeading___Toc376_3226105849"/></text:h>
      <text:h text:style-name="Section_20_Title" text:outline-level="3"><text:bookmark-start text:name="__RefHeading___Toc378_3226105849"/>Tempo <text:bookmark-end text:name="__RefHeading___Toc378_3226105849"/></text:h>
      <text:h text:style-name="Section_20_Title" text:outline-level="3"><text:bookmark-start text:name="__RefHeading___Toc380_3226105849"/>Pressing <text:bookmark-end text:name="__RefHeading___Toc380_3226105849"/></text:h>
      <text:h text:style-name="Chapter_20_Title" text:outline-level="2"><text:bookmark-start text:name="__RefHeading___Toc382_3226105849"/><text:span text:style-name="Strong_20_Emphasis">Team Instructions</text:span><text:bookmark-end text:name="__RefHeading___Toc382_3226105849"/></text:h>
      <text:h text:style-name="Section_20_Title" text:outline-level="3"><text:bookmark-start text:name="__RefHeading___Toc384_3226105849"/>In Possession <text:bookmark-end text:name="__RefHeading___Toc384_3226105849"/></text:h>
      <text:h text:style-name="Section_20_Title" text:outline-level="3"><text:bookmark-start text:name="__RefHeading___Toc386_3226105849"/>In Transition <text:bookmark-end text:name="__RefHeading___Toc386_3226105849"/></text:h>
      <text:h text:style-name="Section_20_Title" text:outline-level="3"><text:bookmark-start text:name="__RefHeading___Toc388_3226105849"/>Out of Possession <text:bookmark-end text:name="__RefHeading___Toc388_3226105849"/></text:h>
      <text:h text:style-name="P12" text:outline-level="1"><text:bookmark-start text:name="__RefHeading___Toc960_3226105849"/>Part <text:span text:style-name="T3">III - </text:span>The Players<text:bookmark-end text:name="__RefHeading___Toc960_3226105849"/></text:h>
      <text:h text:style-name="Chapter_20_Title" text:outline-level="2"><text:bookmark-start text:name="__RefHeading___Toc390_3226105849"/><text:span text:style-name="Strong_20_Emphasis">Player Roles &amp; Duties</text:span><text:bookmark-end text:name="__RefHeading___Toc390_3226105849"/></text:h>
      <text:h text:style-name="Section_20_Title" text:outline-level="3"><text:bookmark-start text:name="__RefHeading___Toc392_3226105849"/>Roles <text:span text:style-name="T4">E</text:span>xplained <text:bookmark-end text:name="__RefHeading___Toc392_3226105849"/></text:h>
      <text:h text:style-name="Section_20_Title" text:outline-level="3"><text:bookmark-start text:name="__RefHeading___Toc394_3226105849"/>Duties <text:bookmark-end text:name="__RefHeading___Toc394_3226105849"/></text:h>
      <text:h text:style-name="Section_20_Title" text:outline-level="3"><text:bookmark-start text:name="__RefHeading___Toc396_3226105849"/>Partnerships <text:bookmark-end text:name="__RefHeading___Toc396_3226105849"/></text:h>
      <text:h text:style-name="Section_20_Title" text:outline-level="3"><text:bookmark-start text:name="__RefHeading___Toc398_3226105849"/>Complementary <text:span text:style-name="T4">R</text:span>oles <text:bookmark-end text:name="__RefHeading___Toc398_3226105849"/></text:h>
      <text:h text:style-name="Chapter_20_Title" text:outline-level="2"><text:bookmark-start text:name="__RefHeading___Toc400_3226105849"/><text:span text:style-name="Strong_20_Emphasis">Player Instructions</text:span><text:bookmark-end text:name="__RefHeading___Toc400_3226105849"/></text:h>
      <text:h text:style-name="Section_20_Title" text:outline-level="3"><text:bookmark-start text:name="__RefHeading___Toc402_3226105849"/>When to <text:span text:style-name="T4">O</text:span>verride a <text:span text:style-name="T4">R</text:span>ole <text:bookmark-end text:name="__RefHeading___Toc402_3226105849"/></text:h>
      <text:h text:style-name="Section_20_Title" text:outline-level="3"><text:bookmark-start text:name="__RefHeading___Toc404_3226105849"/>Simplicity <text:bookmark-end text:name="__RefHeading___Toc404_3226105849"/></text:h>
      <text:h text:style-name="Section_20_Title" text:outline-level="3"><text:bookmark-start text:name="__RefHeading___Toc406_3226105849"/>Common <text:span text:style-name="T4">M</text:span>istakes <text:bookmark-end text:name="__RefHeading___Toc406_3226105849"/></text:h>
      <text:h text:style-name="P13" text:outline-level="1"><text:bookmark-start text:name="__RefHeading___Toc962_3226105849"/>Part <text:span text:style-name="T3">IV - </text:span>Match Management<text:bookmark-end text:name="__RefHeading___Toc962_3226105849"/></text:h>
      <text:h text:style-name="Chapter_20_Title" text:outline-level="2"><text:bookmark-start text:name="__RefHeading___Toc408_3226105849"/><text:span text:style-name="Strong_20_Emphasis">Opposition Analysis</text:span><text:bookmark-end text:name="__RefHeading___Toc408_3226105849"/></text:h>
      <text:h text:style-name="Section_20_Title" text:outline-level="3"><text:bookmark-start text:name="__RefHeading___Toc410_3226105849"/>Scouting <text:bookmark-end text:name="__RefHeading___Toc410_3226105849"/></text:h>
      <text:h text:style-name="Section_20_Title" text:outline-level="3"><text:bookmark-start text:name="__RefHeading___Toc412_3226105849"/>Opposition reports <text:bookmark-end text:name="__RefHeading___Toc412_3226105849"/></text:h>
      <text:h text:style-name="Section_20_Title" text:outline-level="3"><text:bookmark-start text:name="__RefHeading___Toc414_3226105849"/>Identifying weaknesses <text:bookmark-end text:name="__RefHeading___Toc414_3226105849"/></text:h>
      <text:h text:style-name="Chapter_20_Title" text:outline-level="2"><text:bookmark-start text:name="__RefHeading___Toc416_3226105849"/><text:span text:style-name="Strong_20_Emphasis">Match Day</text:span><text:bookmark-end text:name="__RefHeading___Toc416_3226105849"/></text:h>
      <text:h text:style-name="Section_20_Title" text:outline-level="3"><text:bookmark-start text:name="__RefHeading___Toc418_3226105849"/>Reading the match <text:bookmark-end text:name="__RefHeading___Toc418_3226105849"/></text:h>
      <text:h text:style-name="Section_20_Title" text:outline-level="3"><text:bookmark-start text:name="__RefHeading___Toc420_3226105849"/>Tactical tweaks <text:bookmark-end text:name="__RefHeading___Toc420_3226105849"/></text:h>
      <text:h text:style-name="Section_20_Title" text:outline-level="3"><text:bookmark-start text:name="__RefHeading___Toc422_3226105849"/>Shouts <text:bookmark-end text:name="__RefHeading___Toc422_3226105849"/></text:h>
      <text:h text:style-name="Section_20_Title" text:outline-level="3"><text:bookmark-start text:name="__RefHeading___Toc424_3226105849"/>Substitutions <text:bookmark-end text:name="__RefHeading___Toc424_3226105849"/></text:h>
      <text:h text:style-name="Chapter_20_Title" text:outline-level="2"><text:bookmark-start text:name="__RefHeading___Toc426_3226105849"/><text:span text:style-name="Strong_20_Emphasis">Performance Analysis</text:span><text:bookmark-end text:name="__RefHeading___Toc426_3226105849"/></text:h>
      <text:h text:style-name="Section_20_Title" text:outline-level="3"><text:bookmark-start text:name="__RefHeading___Toc428_3226105849"/>xG <text:bookmark-end text:name="__RefHeading___Toc428_3226105849"/></text:h>
      <text:h text:style-name="Section_20_Title" text:outline-level="3"><text:bookmark-start text:name="__RefHeading___Toc430_3226105849"/>Data Hub <text:bookmark-end text:name="__RefHeading___Toc430_3226105849"/></text:h>
      <text:h text:style-name="Section_20_Title" text:outline-level="3"><text:bookmark-start text:name="__RefHeading___Toc432_3226105849"/>Momentum <text:bookmark-end text:name="__RefHeading___Toc432_3226105849"/></text:h>
      <text:h text:style-name="Section_20_Title" text:outline-level="3"><text:bookmark-start text:name="__RefHeading___Toc434_3226105849"/>Player ratings <text:bookmark-end text:name="__RefHeading___Toc434_3226105849"/></text:h>
      <text:h text:style-name="Section_20_Title" text:outline-level="3"><text:bookmark-start text:name="__RefHeading___Toc436_3226105849"/>Learning from matches<text:bookmark-end text:name="__RefHeading___Toc436_3226105849"/></text:h>
      <text:p text:style-name="Body_20_Text"/>
      <text:h text:style-name="P8" text:outline-level="2"><text:soft-page-break/></text:h>
      <text:h text:style-name="P9" text:outline-level="2"><text:bookmark-start text:name="__RefHeading___Toc274_874366845"/>Appendix – Revision History<text:bookmark-end text:name="__RefHeading___Toc274_87436684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adornments="Bold" style:font-family-generic="swiss"/>
    <style:font-face style:name="Calibri2" svg:font-family="Calibri" style:font-adornments="Regular"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trick Hand" svg:font-family="'Patrick Hand'" style:font-adornments="Bold Italic" style:font-pitch="variable"/>
    <style:font-face style:name="Tahoma" svg:font-family="Tahoma"/>
    <style:font-face style:name="Tahoma1" svg:font-family="Tahoma" style:font-adornments="Bold" style:font-family-generic="swiss"/>
    <style:font-face style:name="Tahoma2" svg:font-family="Tahoma"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DejaVu Sans" style:font-size-asian="12pt" style:language-asian="zh" style:country-asian="CN" style:font-name-complex="Noto Sans Arabic UI"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loext:hidden="true" style:hidden="true" style:class="text"/>
    <style:style style:name="Book_20_Title" style:display-name="Book Title" style:family="paragraph" style:master-page-name="">
      <style:paragraph-properties fo:margin-left="0cm" fo:margin-right="0cm" fo:margin-top="0cm" fo:margin-bottom="0.6cm" style:contextual-spacing="false" fo:text-align="center" style:justify-single-word="false" fo:text-indent="0cm" style:auto-text-indent="false" style:page-number="auto" fo:break-before="auto" fo:break-after="auto" fo:keep-with-next="always"/>
      <style:text-properties fo:color="#729fcf" loext:opacity="100%" style:font-name="Tahoma" fo:font-family="Tahoma" fo:font-size="24pt" fo:font-weight="bold"/>
    </style:style>
    <style:style style:name="Book_20_Subtitle" style:display-name="Book Subtitle" style:family="paragraph" style:parent-style-name="Book_20_Title" style:master-page-name="">
      <style:paragraph-properties fo:margin-left="0cm" fo:margin-right="0cm" fo:margin-top="0cm" fo:margin-bottom="0.4cm" style:contextual-spacing="false" fo:text-indent="0cm" style:auto-text-indent="false" style:page-number="auto" fo:break-before="auto" fo:break-after="auto" fo:keep-with-next="auto"/>
      <style:text-properties fo:color="#729fcf" loext:opacity="100%" style:font-name="Tahoma" fo:font-family="Tahoma" fo:font-size="18pt" fo:font-weight="normal"/>
    </style:style>
    <style:style style:name="Chapter_20_Title" style:display-name="Chapter Title" style:family="paragraph" style:next-style-name="Section_20_Title" style:auto-update="true" style:default-outline-level="2" style:master-page-name="">
      <style:paragraph-properties fo:margin-left="0cm" fo:margin-right="0cm" fo:margin-top="1cm" fo:margin-bottom="0.6cm" style:contextual-spacing="true" fo:text-align="start" style:justify-single-word="false" fo:text-indent="0cm" style:auto-text-indent="false" style:page-number="auto" fo:break-before="auto" fo:break-after="auto" fo:keep-with-next="always">
        <style:tab-stops>
          <style:tab-stop style:position="1.111cm"/>
        </style:tab-stops>
      </style:paragraph-properties>
      <style:text-properties fo:color="#7a1f1f" loext:opacity="100%" style:font-name="Tahoma" fo:font-family="Tahoma" fo:font-size="16pt" fo:font-weight="bold"/>
    </style:style>
    <style:style style:name="Section_20_Title" style:display-name="Section Title" style:family="paragraph" style:parent-style-name="Chapter_20_Title" style:next-style-name="Body_20_Text" style:auto-update="true" style:default-outline-level="3" style:master-page-name="">
      <style:paragraph-properties fo:margin-left="0cm" fo:margin-right="0cm" fo:margin-top="0cm" fo:margin-bottom="0.4cm" style:contextual-spacing="false" fo:text-indent="0cm" style:auto-text-indent="false" style:page-number="auto" fo:break-before="auto" fo:break-after="auto" fo:keep-with-next="auto"/>
      <style:text-properties fo:color="#7a1f1f" loext:opacity="100%" style:font-name="Tahoma" fo:font-family="Tahoma" fo:font-size="14pt" fo:font-weight="normal"/>
    </style:style>
    <style:style style:name="Subsection_20_Title" style:display-name="Subsection Title" style:family="paragraph" style:parent-style-name="Section_20_Title" style:next-style-name="Body_20_Text" style:auto-update="true" style:default-outline-level="4">
      <style:paragraph-properties fo:margin-left="0cm" fo:margin-right="0cm" fo:margin-top="0cm" fo:margin-bottom="0.4cm" style:contextual-spacing="false" fo:text-indent="0cm" style:auto-text-indent="false"/>
      <style:text-properties fo:color="#7a1f1f" loext:opacity="100%" style:font-name="Tahoma" fo:font-family="Tahoma" fo:font-size="12pt" fo:font-weight="normal" style:font-size-asian="16pt" style:font-weight-asian="normal" style:font-size-complex="16pt" style:font-weight-complex="normal"/>
    </style:style>
    <style:style style:name="Minor_20_Heading" style:display-name="Minor Heading" style:family="paragraph" style:parent-style-name="Subsection_20_Title" style:auto-update="true" style:default-outline-level="5">
      <style:paragraph-properties fo:margin-top="0cm" fo:margin-bottom="0.3cm" style:contextual-spacing="false"/>
      <style:text-properties fo:color="#7a1f1f" loext:opacity="100%" style:font-name="Tahoma" fo:font-family="Tahoma" fo:font-size="11pt" style:font-size-asian="16pt" style:font-size-complex="16pt"/>
    </style:style>
    <style:style style:name="Body_20_Text" style:display-name="Body Text" style:family="paragraph">
      <style:paragraph-properties fo:margin-left="0cm" fo:margin-right="0cm" fo:margin-top="0.101cm" fo:margin-bottom="0.101cm" style:contextual-spacing="false" fo:text-indent="0cm" style:auto-text-indent="false"/>
      <style:text-properties style:font-name="Calibri" fo:font-family="Calibri" fo:font-size="11pt"/>
    </style:style>
    <style:style style:name="Quote" style:family="paragraph" style:parent-style-name="Body_20_Text">
      <style:paragraph-properties fo:text-align="center" style:justify-single-word="false"/>
      <style:text-properties fo:color="#555555" loext:opacity="100%" style:font-name="Calibri" fo:font-family="Calibri" fo:font-size="11pt" fo:font-style="italic"/>
    </style:style>
    <style:style style:name="FM_20_Behaviour" style:display-name="FM Behaviour" style:family="paragraph" style:parent-style-name="Panel_20_Heading" style:master-page-name="">
      <loext:graphic-properties draw:fill="solid" draw:fill-color="#b4c7dc"/>
      <style:paragraph-properties fo:margin-left="0.3cm" fo:margin-right="0.3cm" fo:margin-top="0.101cm" fo:margin-bottom="0.101cm" style:contextual-spacing="false" fo:text-indent="0cm" style:auto-text-indent="false" style:page-number="auto" fo:background-color="#b4c7dc" fo:padding-left="0.3cm" fo:padding-right="0.3cm" fo:padding-top="0.15cm" fo:padding-bottom="0.15cm" fo:border="0.74pt solid #5983b0" style:join-border="true">
        <style:tab-stops/>
      </style:paragraph-properties>
      <style:text-properties fo:color="#1565c0" loext:opacity="100%" style:font-name="Calibri" fo:font-family="Calibri" fo:font-size="11pt" fo:font-weight="normal"/>
    </style:style>
    <style:style style:name="Tactical_20_Principle" style:display-name="Tactical Principle" style:family="paragraph" style:parent-style-name="Panel_20_Heading">
      <loext:graphic-properties draw:fill="solid" draw:fill-color="#81aca6"/>
      <style:paragraph-properties fo:background-color="#81aca6" fo:padding-left="0.3cm" fo:padding-right="0.3cm" fo:padding-top="0.199cm" fo:padding-bottom="0.15cm" fo:border="0.74pt solid #168253"/>
      <style:text-properties fo:color="#2e7d32" loext:opacity="100%" style:font-name="Calibri" fo:font-family="Calibri" fo:font-size="11pt" fo:font-weight="normal"/>
    </style:style>
    <style:style style:name="Managers_20_Journal" style:display-name="Managers Journal" style:family="paragraph" style:parent-style-name="Panel_20_Heading">
      <loext:graphic-properties draw:fill="solid" draw:fill-color="#ffffff"/>
      <style:paragraph-properties fo:margin-left="0.3cm" fo:margin-right="0.3cm" fo:margin-top="0cm" fo:margin-bottom="0cm" style:contextual-spacing="false" fo:text-indent="0cm" style:auto-text-indent="false" fo:background-color="#ffffff" fo:padding-left="0.3cm" fo:padding-right="0.3cm" fo:padding-top="0.15cm" fo:padding-bottom="0.15cm" fo:border="0.74pt solid #ff0000" style:shadow="none"/>
      <style:text-properties fo:color="#c62828" loext:opacity="100%" style:font-name="Patrick Hand" fo:font-family="'Patrick Hand'" style:font-style-name="Bold Italic" style:font-pitch="variable" fo:font-size="11pt" fo:font-style="normal" fo:font-weight="normal"/>
    </style:style>
    <style:style style:name="Warning" style:family="paragraph" style:parent-style-name="Panel_20_Heading">
      <loext:graphic-properties draw:fill="solid" draw:fill-color="#cccccc"/>
      <style:paragraph-properties fo:margin-top="0.199cm" fo:margin-bottom="0.199cm" style:contextual-spacing="false" fo:background-color="#cccccc" fo:padding-left="0.3cm" fo:padding-right="0.3cm" fo:padding-top="0.15cm" fo:padding-bottom="0.15cm" fo:border="0.74pt solid #666666"/>
      <style:text-properties fo:color="#666666" loext:opacity="100%" style:font-name="Calibri" fo:font-family="Calibri" fo:font-size="11pt" fo:font-weight="normal"/>
    </style:style>
    <style:style style:name="Match_20_Tip" style:display-name="Match Tip" style:family="paragraph" style:parent-style-name="Panel_20_Heading">
      <loext:graphic-properties draw:fill="solid" draw:fill-color="#ffe994"/>
      <style:paragraph-properties fo:margin-top="0.199cm" fo:margin-bottom="0.199cm" style:contextual-spacing="false" fo:background-color="#ffe994" fo:padding-left="0.3cm" fo:padding-right="0.3cm" fo:padding-top="0.199cm" fo:padding-bottom="0.15cm" fo:border="0.74pt solid #8a6d00"/>
      <style:text-properties fo:color="#8a6d00" loext:opacity="100%" style:font-name="Calibri" fo:font-family="Calibri" fo:font-size="11pt" fo:font-weight="normal"/>
    </style:style>
    <style:style style:name="RevisionNote" style:family="paragraph" style:parent-style-name="Body_20_Text">
      <style:paragraph-properties fo:margin-top="0.199cm" fo:margin-bottom="0cm" style:contextual-spacing="false"/>
      <style:text-properties fo:color="#c62828" loext:opacity="100%" style:font-name="Calibri" fo:font-family="Calibri" fo:font-size="10pt" fo:font-style="italic"/>
    </style:style>
    <style:style style:name="Caption" style:family="paragraph" style:parent-style-name="Body_20_Text" style:class="extra">
      <style:paragraph-properties fo:margin-top="0.199cm" fo:margin-bottom="0.199cm" style:contextual-spacing="false"/>
      <style:text-properties fo:color="#666666" loext:opacity="100%" style:font-name="Calibri" fo:font-family="Calibri" fo:font-size="9pt" fo:font-style="italic"/>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libri1" fo:font-family="Calibri" style:font-style-name="Bold" style:font-family-generic="swiss" fo:font-size="12pt" fo:font-weight="normal" style:font-size-asian="16pt" style:font-weight-asian="bold" style:font-size-complex="16pt" style:font-weight-complex="600"/>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text:number-lines="false" text:line-number="0"/>
      <style:text-properties style:font-name="Calibri1" fo:font-family="Calibri" style:font-style-name="Bold" style:font-family-generic="swiss" fo:font-size="14pt" fo:font-weight="bold" style:font-size-asian="16pt" style:font-weight-asian="bold" style:font-size-complex="16pt" style:font-weight-complex="600"/>
    </style:style>
    <style:style style:name="Index" style:family="paragraph" style:parent-style-name="Standard" style:class="index">
      <style:paragraph-properties text:number-lines="false" text:line-number="0"/>
      <style:text-properties style:font-name="Calibri2" fo:font-family="Calibri" style:font-style-name="Regular" style:font-family-generic="swiss" fo:font-size="11pt"/>
    </style:style>
    <style:style style:name="Contents_20_1" style:display-name="Contents 1" style:family="paragraph" style:auto-update="true" style:class="index">
      <style:paragraph-properties fo:margin-left="0cm" fo:margin-right="0cm" fo:margin-top="0.6cm" fo:margin-bottom="0.199cm" style:contextual-spacing="false" fo:text-indent="0cm" style:auto-text-indent="false">
        <style:tab-stops>
          <style:tab-stop style:position="17cm" style:type="right" style:leader-style="dotted" style:leader-text="."/>
        </style:tab-stops>
      </style:paragraph-properties>
      <style:text-properties style:font-name="Tahoma1" fo:font-family="Tahoma" style:font-style-name="Bold" style:font-family-generic="swiss" fo:font-size="14pt" fo:font-weight="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Contents_20_1" style:auto-update="true" style:class="index">
      <style:paragraph-properties fo:margin-left="0.499cm" fo:margin-right="0cm" fo:margin-top="0.199cm" fo:margin-bottom="0.101cm" style:contextual-spacing="false" fo:text-indent="0cm" style:auto-text-indent="false">
        <style:tab-stops>
          <style:tab-stop style:position="17cm" style:type="right"/>
        </style:tab-stops>
      </style:paragraph-properties>
      <style:text-properties fo:font-size="12pt"/>
    </style:style>
    <style:style style:name="Contents_20_3" style:display-name="Contents 3" style:family="paragraph" style:parent-style-name="Contents_20_2" style:class="index">
      <style:paragraph-properties fo:margin-left="1cm" fo:margin-right="0cm" fo:margin-top="0.101cm" fo:margin-bottom="0cm" style:contextual-spacing="false" fo:text-indent="0cm" style:auto-text-indent="false">
        <style:tab-stops>
          <style:tab-stop style:position="16cm" style:type="right" style:leader-style="dotted" style:leader-text="."/>
        </style:tab-stops>
      </style:paragraph-properties>
      <style:text-properties style:font-name="Tahoma2" fo:font-family="Tahoma" style:font-style-name="Regular" style:font-family-generic="swiss" fo:font-size="11pt" fo:font-weight="normal"/>
    </style:style>
    <style:style style:name="Contents_20_4" style:display-name="Contents 4" style:family="paragraph" style:parent-style-name="Contents_20_3"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style:font-name="Tahoma2" fo:font-family="Tahoma" style:font-style-name="Regular" style:font-family-generic="swis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nel_20_Heading" style:display-name="Panel Heading" style:family="paragraph" style:auto-update="true">
      <loext:graphic-properties draw:fill="solid" draw:fill-color="#729fcf"/>
      <style:paragraph-properties fo:margin-left="0.3cm" fo:margin-right="0.3cm" fo:margin-top="0.101cm" fo:margin-bottom="0.101cm" style:contextual-spacing="false" fo:text-indent="0cm" style:auto-text-indent="false" fo:background-color="#729fcf" fo:padding-left="0.199cm" fo:padding-right="0.199cm" fo:padding-top="0.15cm" fo:padding-bottom="0.15cm" fo:border="3pt solid #000000"/>
      <style:text-properties style:font-name="Tahoma2" fo:font-family="Tahoma" style:font-style-name="Regular" style:font-family-generic="swiss" fo:font-size="11pt" fo:font-weight="normal"/>
    </style:style>
    <style:style style:name="Evidence" style:family="paragraph" style:parent-style-name="Panel_20_Heading">
      <loext:graphic-properties draw:fill="solid" draw:fill-color="#e0c2cd"/>
      <style:paragraph-properties fo:margin-left="0.3cm" fo:margin-right="0.3cm" fo:margin-top="0.101cm" fo:margin-bottom="0.101cm" style:contextual-spacing="false" fo:text-indent="0cm" style:auto-text-indent="false" fo:background-color="#e0c2cd" fo:padding-left="0.3cm" fo:padding-right="0.3cm" fo:padding-top="0.199cm" fo:padding-bottom="0.15cm" fo:border="0.74pt solid #8d1d75"/>
      <style:text-properties fo:color="#8d1d75" loext:opacity="100%" fo:font-weight="normal"/>
    </style:style>
    <style:style style:name="Example" style:family="paragraph" style:parent-style-name="Panel_20_Heading">
      <loext:graphic-properties draw:fill="solid" draw:fill-color="#e8f2a1"/>
      <style:paragraph-properties fo:margin-top="0.101cm" fo:margin-bottom="0.101cm" style:contextual-spacing="false" fo:background-color="#e8f2a1" fo:padding-left="0.3cm" fo:padding-right="0.3cm" fo:padding-top="0.199cm" fo:padding-bottom="0.15cm" fo:border="0.74pt solid #468a1a"/>
      <style:text-properties fo:color="#468a1a" loext:opacity="100%" fo:font-weight="normal"/>
    </style:style>
    <style:style style:name="Part_20_Title" style:display-name="Part Title" style:family="paragraph" style:parent-style-name="Book_20_Title" style:auto-update="true" style:default-outline-level="1" style:master-page-name="frontMatter">
      <style:paragraph-properties fo:margin-top="2cm" fo:margin-bottom="1cm" style:contextual-spacing="false" style:page-number="auto" fo:break-before="auto" fo:break-after="auto" text:number-lines="false" text:line-number="0"/>
      <style:text-properties fo:font-size="2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art_20_Subtitle" style:display-name="Part Subtitle" style:family="paragraph" style:parent-style-name="Part_20_Title" style:default-outline-level="" style:list-style-name="" style:master-page-name="">
      <style:paragraph-properties fo:margin-top="0cm" fo:margin-bottom="1cm" style:contextual-spacing="false" style:page-number="auto" fo:break-before="auto" fo:break-after="auto" fo:keep-with-next="auto"/>
      <style:text-properties fo:color="#999999" loext:opacity="100%" fo:font-size="18pt" fo:font-weight="normal"/>
    </style:style>
    <style:style style:name="Contents_20_5" style:display-name="Contents 5" style:family="paragraph" style:parent-style-name="Contents_20_4" style:class="index">
      <style:paragraph-properties fo:margin-left="2.3cm" fo:margin-right="0cm" fo:text-indent="0cm" style:auto-text-indent="false">
        <style:tab-stops>
          <style:tab-stop style:position="15cm" style:type="right" style:leader-style="dotted" style:leader-text="."/>
        </style:tab-stops>
      </style:paragraph-properties>
      <style:text-properties fo:font-size="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7cm" fo:break-before="page" table:align="margins"/>
    </style:style>
    <style:style style:name="Table4.A" style:family="table-column">
      <style:table-column-properties style:column-width="5.667cm" style:rel-column-width="21844*"/>
    </style:style>
    <style:style style:name="Table4.B" style:family="table-column">
      <style:table-column-properties style:column-width="5.667cm" style:rel-column-width="21846*"/>
    </style:style>
    <style:style style:name="Table4.C" style:family="table-column">
      <style:table-column-properties style:column-width="5.667cm" style:rel-column-width="21845*"/>
    </style:style>
    <style:style style:name="Table4.A1" style:family="table-cell">
      <style:table-cell-properties fo:padding="0.097cm" fo:border="none"/>
    </style:style>
    <style:style style:name="MP1" style:family="paragraph" style:parent-style-name="Body_20_Text">
      <style:paragraph-properties fo:text-align="center" style:justify-single-word="false"/>
    </style:style>
    <style:style style:name="MP2" style:family="paragraph" style:parent-style-name="Body_20_Text">
      <style:paragraph-properties fo:text-align="end" style:justify-single-word="false"/>
    </style:style>
    <style:style style:name="MP3" style:family="paragraph" style:parent-style-name="Body_20_Text">
      <style:text-properties officeooo:rsid="0006db54" officeooo:paragraph-rsid="0006db54"/>
    </style:style>
    <style:style style:name="MT1" style:family="text">
      <style:text-properties officeooo:rsid="0011e173"/>
    </style:style>
    <style:style style:name="MT2" style:family="text">
      <style:text-properties officeooo:rsid="00148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1" draw:style-name="Mdp1" style:next-style-name="Standard"/>
    <style:master-page style:name="cover" style:page-layout-name="Mpm1" draw:style-name="Mdp1" style:next-style-name="frontMatter"/>
    <style:master-page style:name="Left_20_Page" loext:hidden="true" style:hidden="true" style:display-name="Left Page" style:page-layout-name="Mpm2" draw:style-name="Mdp1" style:next-style-name="Right_20_Page"/>
    <style:master-page style:name="Right_20_Page" loext:hidden="true" style:hidden="true" style:display-name="Right Page" style:page-layout-name="Mpm3" draw:style-name="Mdp1" style:next-style-name="Left_20_Page"/>
    <style:master-page style:name="Envelope" loext:hidden="true" style:hidden="true" style:page-layout-name="Mpm4" draw:style-name="Mdp1"/>
    <style:master-page style:name="Index" loext:hidden="true" style:hidden="true" style:page-layout-name="Mpm1" draw:style-name="Mdp1"/>
    <style:master-page style:name="HTML" loext:hidden="true" style:hidden="true" style:page-layout-name="Mpm5" draw:style-name="Mdp1"/>
    <style:master-page style:name="Footnote" style:page-layout-name="Mpm6" draw:style-name="Mdp1"/>
    <style:master-page style:name="Endnote" style:page-layout-name="Mpm6" draw:style-name="Mdp1"/>
    <style:master-page style:name="Landscape" loext:hidden="true" style:hidden="true" style:page-layout-name="Mpm7" draw:style-name="Mdp1"/>
    <style:master-page style:name="frontMatter" style:page-layout-name="Mpm8" draw:style-name="Mdp1">
      <style:footer>
        <table:table table:name="Table5" table:style-name="Table5">
          <table:table-column table:style-name="Table5.A" table:number-columns-repeated="3"/>
          <table:table-row>
            <table:table-cell table:style-name="Table5.A1" office:value-type="string">
              <text:p text:style-name="Body_20_Text">Version <text:user-defined style:data-style-name="N0" text:name="Version">0.1.0</text:user-defined></text:p>
            </table:table-cell>
            <table:table-cell table:style-name="Table5.A1" office:value-type="string">
              <text:p text:style-name="MP1">Draft</text:p>
            </table:table-cell>
            <table:table-cell table:style-name="Table5.A1" office:value-type="string">
              <text:p text:style-name="MP2"><text:page-number text:select-page="current">x</text:page-number></text:p>
            </table:table-cell>
          </table:table-row>
        </table:table>
        <text:p text:style-name="Footer"/>
      </style:footer>
    </style:master-page>
    <style:master-page style:name="chapter" style:page-layout-name="Mpm9" draw:style-name="Mdp1">
      <style:header>
        <table:table table:name="Table1" table:style-name="Table1">
          <table:table-column table:style-name="Table1.A"/>
          <table:table-column table:style-name="Table1.B"/>
          <table:table-row>
            <table:table-cell table:style-name="Table1.A1" office:value-type="string">
              <text:p text:style-name="MP3"><text:title>The Manager's Handbook</text:title></text:p>
            </table:table-cell>
            <table:table-cell table:style-name="Table1.A1" office:value-type="string">
              <text:p text:style-name="MP2"><text:subject>Philosophy and Tactical Blueprint</text:subject></text:p>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Body_20_Text">Version <text:user-defined style:data-style-name="N0" text:name="Version">0.1.0</text:user-defined></text:p>
            </table:table-cell>
            <table:table-cell table:style-name="Table2.A1" office:value-type="string">
              <text:p text:style-name="MP1">Draft</text:p>
            </table:table-cell>
            <table:table-cell table:style-name="Table2.A1" office:value-type="string">
              <text:p text:style-name="MP2"><text:page-number text:select-page="current">8</text:page-number><text:s/><text:span text:style-name="MT1">of </text:span><text:span text:style-name="MT1"><text:page-count>11</text:page-count></text:span></text:p>
            </table:table-cell>
          </table:table-row>
        </table:table>
        <text:p text:style-name="Footer"/>
      </style:footer>
    </style:master-page>
    <style:master-page style:name="appendix" style:page-layout-name="Mpm9" draw:style-name="Mdp1">
      <style:header>
        <table:table table:name="Table3" table:style-name="Table3">
          <table:table-column table:style-name="Table3.A"/>
          <table:table-column table:style-name="Table3.B"/>
          <table:table-row>
            <table:table-cell table:style-name="Table3.A1" office:value-type="string">
              <text:p text:style-name="Body_20_Text"><text:title>The Manager's Handbook</text:title></text:p>
            </table:table-cell>
            <table:table-cell table:style-name="Table3.A1" office:value-type="string">
              <text:p text:style-name="MP2"><text:subject>Philosophy and Tactical Blueprint</text:subject></text:p>
            </table:table-cell>
          </table:table-row>
        </table:table>
        <text:p text:style-name="Foot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Body_20_Text">Version <text:user-defined style:data-style-name="N0" text:name="Version">0.1.0</text:user-defined></text:p>
            </table:table-cell>
            <table:table-cell table:style-name="Table4.A1" office:value-type="string">
              <text:p text:style-name="MP1">Draft</text:p>
            </table:table-cell>
            <table:table-cell table:style-name="Table4.A1" office:value-type="string">
              <text:p text:style-name="MP1"><text:span text:style-name="MT2"><text:page-number text:select-page="current">11</text:page-number></text:span><text:span text:style-name="MT2"><text:s/>of </text:span><text:span text:style-name="MT2"><text:page-count>11</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editing-duration>PT4H11M17S</meta:editing-duration>
    <meta:editing-cycles>11</meta:editing-cycles>
    <meta:keyword>Football Manager</meta:keyword>
    <meta:keyword>Tactice</meta:keyword>
    <meta:keyword>Coaching</meta:keyword>
    <meta:keyword>Recruitment</meta:keyword>
    <dc:subject>Philosophy and Tactical Blueprint</dc:subject>
    <dc:title>The Manager's Handbook</dc:title>
    <meta:creation-date>2026-06-29T09:51:10.719993666</meta:creation-date>
    <dc:date>2026-06-30T09:09:11.312803221</dc:date>
    <meta:document-statistic meta:table-count="5" meta:image-count="0" meta:object-count="0" meta:page-count="11" meta:paragraph-count="175" meta:word-count="746" meta:character-count="4603" meta:non-whitespace-character-count="3979"/>
    <meta:user-defined meta:name="Author">Andy Wilson</meta:user-defined>
    <meta:user-defined meta:name="Comments">My living tactical handbook</meta:user-defined>
    <meta:user-defined meta:name="FMVersion">Football Manager 2026 Edition</meta:user-defined>
    <meta:user-defined meta:name="Status">Draft</meta:user-defined>
    <meta:user-defined meta:name="Version" meta:value-type="string">0.1.0</meta:user-defined>
    <meta:user-defined meta:name="Volume" meta:value-type="string">1</meta:user-defined>
    <meta:template xlink:type="simple" xlink:actuate="onRequest" xlink:title="myManagerHandbook-StyleTemplate" xlink:href="../../../../../../../home/andy/.config/libreoffice/4/user/template/myManagerHandbook-StyleTemplate.ott" meta:date="2026-06-29T09:51:10.288544054"/>
  </office:meta>
</office:document-meta>
</file>